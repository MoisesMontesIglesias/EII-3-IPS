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ntrega seminario -&gt; Desarrollador: Moisés Montes Iglesias uo296102</text:p>
      <text:p text:style-name="Normal">Product Owner: María José Suarez Cabal</text:p>
      <text:p text:style-name="Normal">Antecedentes:<text:s/></text:p>
      <text:p text:style-name="Normal">Un administrador de fincas gestiona la economía de un vecindario. Este vecindario realiza cobros mensuales y realiza comprobaciones de gastos comunitarios bimestrales. </text:p>
      <text:p text:style-name="Normal">El administrador consta de toda la información personal y necesaria para realizar los cobros e identificar a los vecinos. </text:p>
      <text:p text:style-name="Normal">El administrador recibe los gastos comunitarios por el ayuntamiento sobre el consumo de agua (también puede mirar los contadores).  </text:p>
      <text:p text:style-name="Normal">El administrador se encarga de variar el cobro de los vecinos si el contador de agua se excede de los límites impuestos por la comunidad o según el piso en el que se encuentre el vecino tiene un coste mensual mayor o menor (véase un ático o un bajo). </text:p>
      <text:p text:style-name="Normal">Si algún vecino decide realizar alguna obra y la junta de vecinos acepta la derrama (cubrir esa obra), se sumará al cobro mensual que se les envía a los vecinos (no se les cobra al momento o mediante el uso de otro recibo). </text:p>
      <text:p text:style-name="Normal">Los recibos se envían al banco que es el encargado de realizar los cobros en las cuentas bancarias. El banco notifica al administrador quien ha realizado sus pagos correctamente y quien no. El administrador es el encargado de avisar en la junta quien no ha cumplido con su pago. En caso de negarse a realizar el pago, la comunidad decide qué hacer con él. </text:p>
      <text:p text:style-name="Normal">El administrador recibe los gastos comunitarios por las empresas contratadas (limpieza, electricidad, etc..) y puede cambiar de proveedores según lo que la junta decida, ya que tiene control sobre quienes son las empresas proveedoras. </text:p>
      <text:p text:style-name="Normal">Si algún vecino cambia su cuenta bancaria, cambian los residentes del piso, etc... Se le notifica al administrador esos cambios que se desean hacer, y este debe realizar los cambios pertinentes. </text:p>
      <text:p text:style-name="Normal">Objetivo:<text:s/>(Definir detalles del sistema)</text:p>
      <text:p text:style-name="Normal">Ideas del objetivo: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ises Montes Iglesias</meta:initial-creator>
    <dc:creator>Moises Montes Iglesias</dc:creator>
    <meta:creation-date>2024-10-05T19:07:00Z</meta:creation-date>
    <dc:date>2024-10-06T00:11:00Z</dc:date>
    <meta:template xlink:href="Normal.dotm" xlink:type="simple"/>
    <meta:editing-cycles>1</meta:editing-cycles>
    <meta:editing-duration>PT18240S</meta:editing-duration>
    <meta:document-statistic meta:page-count="1" meta:paragraph-count="3" meta:word-count="288" meta:character-count="1872" meta:row-count="13" meta:non-whitespace-character-count="1587"/>
  </office:meta>
</office:document-meta>
</file>